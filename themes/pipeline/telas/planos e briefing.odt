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ecei o site 27 usando ele p fazer template e processos novos</text:p>
      <text:p text:style-name="Standard"/>
      <text:p text:style-name="Standard">terminei, e agora é de fato, começar a construir o site novo</text:p>
      <text:p text:style-name="Standard"/>
      <text:p text:style-name="Standard">na real, no que diz respeito a config iniciais, falta tipografia</text:p>
      <text:p text:style-name="Standard">ta apontando p google fonts</text:p>
      <text:p text:style-name="Standard"/>
      <text:p text:style-name="Standard">tem tb aquela pasta fonts com os icones</text:p>
      <text:p text:style-name="Standard"/>
      <text:p text:style-name="Standard"/>
      <text:p text:style-name="Standard">no arquivo index, o header é</text:p>
      <text:p text:style-name="Standard">topbar</text:p>
      <text:p text:style-name="Standard">menu e bts da direita – orçamento e o que abre o menu branco da direia – que tem o blog e tal</text:p>
      <text:p text:style-name="Standard"><text:tab/>sobre o menu</text:p>
      <text:p text:style-name="Standard"><text:tab/><text:tab/>o menu da indextem fundo branco, o site é com fundo transparente, qd for fazer, procurar menu certo</text:p>
      <text:p text:style-name="Standard"/>
      <text:p text:style-name="Standard">entao p hj</text:p>
      <text:p text:style-name="Standard"><text:tab/>arquivo fonts – limar e fazer funcionar, pq tem alguns icones que nao estao funcionando</text:p>
      <text:p text:style-name="Standard"><text:tab/>limar e ver como ficam os pe icons – fazer funcionar</text:p>
      <text:p text:style-name="Standard"/>
      <text:p text:style-name="Standard"><text:tab/>baixar a fonte do google e insalar</text:p>
      <text:p text:style-name="Standard"><text:tab/><text:tab/>o tema aponta para "todas" – 600,700,800,...</text:p>
      <text:p text:style-name="Standard"><text:tab/><text:tab/>ver como eu faço isso baixando</text:p>
      <text:p text:style-name="Standard"/>
      <text:p text:style-name="Standard"><text:tab/>depois actions</text:p>
      <text:p text:style-name="Standard"><text:tab/><text:tab/>nao preciso de branch homolog</text:p>
      <text:p text:style-name="Standard"><text:tab/><text:tab/>pq da pra ir mandando da main p homolog</text:p>
      <text:p text:style-name="Standard"><text:tab/><text:tab/>prod é uma ida só, tlvez filezila seja mais facil</text:p>
      <text:p text:style-name="Standard"/>
      <text:p text:style-name="Standard"><text:tab/><text:tab/>ainda sobre actions – ver como levo o banco</text:p>
      <text:p text:style-name="Standard"><text:tab/><text:tab/><text:tab/>scriot p atualizar sit e home url</text:p>
      <text:p text:style-name="Standard"><text:tab/><text:tab/><text:tab/>e atualizar os guids</text:p>
      <text:p text:style-name="Standard"/>
      <text:p text:style-name="Standard"><text:tab/>qd essas si, estiverem ok, dai sim, terminou configs inicia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16S</meta:editing-duration>
    <meta:editing-cycles>7</meta:editing-cycles>
    <meta:generator>OpenOffice/4.1.15$Win32 OpenOffice.org_project/4115m2$Build-9813</meta:generator>
    <dc:date>2026-03-24T12:45:17.57</dc:date>
    <dc:creator>João Goya Pipeline</dc:creator>
    <meta:document-statistic meta:table-count="0" meta:image-count="0" meta:object-count="0" meta:page-count="1" meta:paragraph-count="24" meta:word-count="204" meta:character-count="1062"/>
    <meta:user-defined meta:name="Info 1"/>
    <meta:user-defined meta:name="Info 2"/>
    <meta:user-defined meta:name="Info 3"/>
    <meta:user-defined meta:name="Info 4"/>
  </office:meta>
</office:document-meta>
</file>